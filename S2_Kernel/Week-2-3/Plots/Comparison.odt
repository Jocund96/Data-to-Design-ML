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DROPPED ===</text:p>
      <text:p text:style-name="Standard"><text:s text:c="7"/>Cement (component 1)(kg in a m^3 mixture) <text:s/>\</text:p>
      <text:p text:style-name="Standard">count <text:s text:c="35"/>1030.00 <text:s text:c="2"/></text:p>
      <text:p text:style-name="Standard">mean <text:s text:c="37"/>281.17 <text:s text:c="2"/></text:p>
      <text:p text:style-name="Standard">std <text:s text:c="38"/>104.51 <text:s text:c="2"/></text:p>
      <text:p text:style-name="Standard">min <text:s text:c="38"/>102.00 <text:s text:c="2"/></text:p>
      <text:p text:style-name="Standard">25% <text:s text:c="38"/>192.38 <text:s text:c="2"/></text:p>
      <text:p text:style-name="Standard">50% <text:s text:c="38"/>272.90 <text:s text:c="2"/></text:p>
      <text:p text:style-name="Standard">75% <text:s text:c="38"/>350.00 <text:s text:c="2"/></text:p>
      <text:p text:style-name="Standard">max <text:s text:c="38"/>540.00 <text:s text:c="2"/></text:p>
      <text:p text:style-name="Standard"/>
      <text:p text:style-name="Standard"><text:s text:c="7"/>Blast Furnace Slag (component 2)(kg in a m^3 mixture) <text:s/>\</text:p>
      <text:p text:style-name="Standard">count <text:s text:c="43"/>1030.00 <text:s text:c="6"/></text:p>
      <text:p text:style-name="Standard">mean <text:s text:c="46"/>73.90 <text:s text:c="6"/></text:p>
      <text:p text:style-name="Standard">std <text:s text:c="47"/>86.28 <text:s text:c="6"/></text:p>
      <text:p text:style-name="Standard">min <text:s text:c="48"/>0.00 <text:s text:c="6"/></text:p>
      <text:p text:style-name="Standard">25% <text:s text:c="48"/>0.00 <text:s text:c="6"/></text:p>
      <text:p text:style-name="Standard">50% <text:s text:c="47"/>22.00 <text:s text:c="6"/></text:p>
      <text:p text:style-name="Standard">75% <text:s text:c="46"/>142.95 <text:s text:c="6"/></text:p>
      <text:p text:style-name="Standard">max <text:s text:c="46"/>359.40 <text:s text:c="6"/></text:p>
      <text:p text:style-name="Standard"/>
      <text:p text:style-name="Standard"><text:s text:c="7"/>Fly Ash (component 3)(kg in a m^3 mixture) <text:s/>\</text:p>
      <text:p text:style-name="Standard">count <text:s text:c="36"/>1030.00 <text:s text:c="2"/></text:p>
      <text:p text:style-name="Standard">mean <text:s text:c="39"/>54.19 <text:s text:c="2"/></text:p>
      <text:p text:style-name="Standard">std <text:s text:c="40"/>64.00 <text:s text:c="2"/></text:p>
      <text:p text:style-name="Standard">min <text:s text:c="41"/>0.00 <text:s text:c="2"/></text:p>
      <text:p text:style-name="Standard">25% <text:s text:c="41"/>0.00 <text:s text:c="2"/></text:p>
      <text:p text:style-name="Standard">50% <text:s text:c="41"/>0.00 <text:s text:c="2"/></text:p>
      <text:p text:style-name="Standard">75% <text:s text:c="39"/>118.27 <text:s text:c="2"/></text:p>
      <text:p text:style-name="Standard">max <text:s text:c="39"/>200.10 <text:s text:c="2"/></text:p>
      <text:p text:style-name="Standard"/>
      <text:p text:style-name="Standard"><text:s text:c="7"/>Water <text:s/>(component 4)(kg in a m^3 mixture) <text:s/>\</text:p>
      <text:p text:style-name="Standard">count <text:s text:c="35"/>1030.00 <text:s text:c="2"/></text:p>
      <text:p text:style-name="Standard">mean <text:s text:c="37"/>181.57 <text:s text:c="2"/></text:p>
      <text:p text:style-name="Standard">std <text:s text:c="39"/>21.36 <text:s text:c="2"/></text:p>
      <text:p text:style-name="Standard">min <text:s text:c="38"/>121.75 <text:s text:c="2"/></text:p>
      <text:p text:style-name="Standard">25% <text:s text:c="38"/>164.90 <text:s text:c="2"/></text:p>
      <text:p text:style-name="Standard">50% <text:s text:c="38"/>185.00 <text:s text:c="2"/></text:p>
      <text:p text:style-name="Standard">75% <text:s text:c="38"/>192.00 <text:s text:c="2"/></text:p>
      <text:p text:style-name="Standard">max <text:s text:c="38"/>247.00 <text:s text:c="2"/></text:p>
      <text:p text:style-name="Standard"/>
      <text:p text:style-name="Standard"><text:s text:c="7"/>Superplasticizer (component 5)(kg in a m^3 mixture) <text:s/>\</text:p>
      <text:p text:style-name="Standard">count <text:s text:c="43"/>1030.00 <text:s text:c="4"/></text:p>
      <text:p text:style-name="Standard">mean <text:s text:c="47"/>6.20 <text:s text:c="4"/></text:p>
      <text:p text:style-name="Standard">std <text:s text:c="48"/>5.97 <text:s text:c="4"/></text:p>
      <text:p text:style-name="Standard">min <text:s text:c="48"/>0.00 <text:s text:c="4"/></text:p>
      <text:p text:style-name="Standard">25% <text:s text:c="48"/>0.00 <text:s text:c="4"/></text:p>
      <text:p text:style-name="Standard">50% <text:s text:c="48"/>6.35 <text:s text:c="4"/></text:p>
      <text:p text:style-name="Standard">75% <text:s text:c="47"/>10.16 <text:s text:c="4"/></text:p>
      <text:p text:style-name="Standard">max <text:s text:c="47"/>32.20 <text:s text:c="4"/></text:p>
      <text:p text:style-name="Standard"/>
      <text:p text:style-name="Standard"><text:s text:c="7"/>Coarse Aggregate <text:s/>(component 6)(kg in a m^3 mixture) <text:s/>\</text:p>
      <text:p text:style-name="Standard"><text:soft-page-break/>count <text:s text:c="43"/>1030.00 <text:s text:c="5"/></text:p>
      <text:p text:style-name="Standard">mean <text:s text:c="45"/>972.92 <text:s text:c="5"/></text:p>
      <text:p text:style-name="Standard">std <text:s text:c="47"/>77.75 <text:s text:c="5"/></text:p>
      <text:p text:style-name="Standard">min <text:s text:c="46"/>801.00 <text:s text:c="5"/></text:p>
      <text:p text:style-name="Standard">25% <text:s text:c="46"/>932.00 <text:s text:c="5"/></text:p>
      <text:p text:style-name="Standard">50% <text:s text:c="46"/>968.00 <text:s text:c="5"/></text:p>
      <text:p text:style-name="Standard">75% <text:s text:c="45"/>1029.40 <text:s text:c="5"/></text:p>
      <text:p text:style-name="Standard">max <text:s text:c="45"/>1145.00 <text:s text:c="5"/></text:p>
      <text:p text:style-name="Standard"/>
      <text:p text:style-name="Standard"><text:s text:c="7"/>Fine Aggregate (component 7)(kg in a m^3 mixture) <text:s/>Age (day) <text:s/>\</text:p>
      <text:p text:style-name="Standard">count <text:s text:c="43"/>1030.00 <text:s text:c="3"/>1030.00 <text:s text:c="2"/></text:p>
      <text:p text:style-name="Standard">mean <text:s text:c="45"/>773.58 <text:s text:c="5"/>45.66 <text:s text:c="2"/></text:p>
      <text:p text:style-name="Standard">std <text:s text:c="47"/>80.18 <text:s text:c="5"/>63.17 <text:s text:c="2"/></text:p>
      <text:p text:style-name="Standard">min <text:s text:c="46"/>594.00 <text:s text:c="6"/>1.00 <text:s text:c="2"/></text:p>
      <text:p text:style-name="Standard">25% <text:s text:c="46"/>730.95 <text:s text:c="6"/>7.00 <text:s text:c="2"/></text:p>
      <text:p text:style-name="Standard">50% <text:s text:c="46"/>779.51 <text:s text:c="5"/>28.00 <text:s text:c="2"/></text:p>
      <text:p text:style-name="Standard">75% <text:s text:c="46"/>824.00 <text:s text:c="5"/>56.00 <text:s text:c="2"/></text:p>
      <text:p text:style-name="Standard">max <text:s text:c="46"/>992.60 <text:s text:c="4"/>365.00 <text:s text:c="2"/></text:p>
      <text:p text:style-name="Standard"/>
      <text:p text:style-name="Standard"><text:s text:c="7"/>Concrete compressive strength(MPa, megapascals) <text:s text:c="2"/></text:p>
      <text:p text:style-name="Standard">count <text:s text:c="42"/>1030.00 <text:s/></text:p>
      <text:p text:style-name="Standard">mean <text:s text:c="45"/>35.82 <text:s/></text:p>
      <text:p text:style-name="Standard">std <text:s text:c="46"/>16.71 <text:s/></text:p>
      <text:p text:style-name="Standard">min <text:s text:c="47"/>2.33 <text:s/></text:p>
      <text:p text:style-name="Standard">25% <text:s text:c="46"/>23.71 <text:s/></text:p>
      <text:p text:style-name="Standard">50% <text:s text:c="46"/>34.44 <text:s/></text:p>
      <text:p text:style-name="Standard">75% <text:s text:c="46"/>46.14 <text:s/></text:p>
      <text:p text:style-name="Standard">max <text:s text:c="46"/>82.60 <text:s/></text:p>
      <text:p text:style-name="Standard"/>
      <text:p text:style-name="Standard">=== MEAN IMPUTED ===</text:p>
      <text:p text:style-name="Standard"><text:s text:c="7"/>Cement (component 1)(kg in a m^3 mixture) <text:s/>\</text:p>
      <text:p text:style-name="Standard">count <text:s text:c="35"/>1080.00 <text:s text:c="2"/></text:p>
      <text:p text:style-name="Standard">mean <text:s text:c="37"/>281.49 <text:s text:c="2"/></text:p>
      <text:p text:style-name="Standard">std <text:s text:c="38"/>102.61 <text:s text:c="2"/></text:p>
      <text:p text:style-name="Standard">min <text:s text:c="38"/>102.00 <text:s text:c="2"/></text:p>
      <text:p text:style-name="Standard">25% <text:s text:c="38"/>194.68 <text:s text:c="2"/></text:p>
      <text:p text:style-name="Standard">50% <text:s text:c="38"/>277.00 <text:s text:c="2"/></text:p>
      <text:p text:style-name="Standard">75% <text:s text:c="38"/>349.07 <text:s text:c="2"/></text:p>
      <text:p text:style-name="Standard">max <text:s text:c="38"/>540.00 <text:s text:c="2"/></text:p>
      <text:p text:style-name="Standard"/>
      <text:p text:style-name="Standard"><text:s text:c="7"/>Blast Furnace Slag (component 2)(kg in a m^3 mixture) <text:s/>\</text:p>
      <text:p text:style-name="Standard">count <text:s text:c="43"/>1080.00 <text:s text:c="6"/></text:p>
      <text:p text:style-name="Standard">mean <text:s text:c="46"/>73.79 <text:s text:c="6"/></text:p>
      <text:p text:style-name="Standard">std <text:s text:c="47"/>84.91 <text:s text:c="6"/></text:p>
      <text:p text:style-name="Standard">min <text:s text:c="48"/>0.00 <text:s text:c="6"/></text:p>
      <text:p text:style-name="Standard">25% <text:s text:c="48"/>0.00 <text:s text:c="6"/></text:p>
      <text:p text:style-name="Standard">50% <text:s text:c="47"/>24.00 <text:s text:c="6"/></text:p>
      <text:p text:style-name="Standard">75% <text:s text:c="46"/>141.30 <text:s text:c="6"/></text:p>
      <text:p text:style-name="Standard">max <text:s text:c="46"/>359.40 <text:s text:c="6"/></text:p>
      <text:p text:style-name="Standard"/>
      <text:p text:style-name="Standard"><text:s text:c="7"/>Fly Ash (component 3)(kg in a m^3 mixture) <text:s/>\</text:p>
      <text:p text:style-name="Standard">count <text:s text:c="36"/>1080.00 <text:s text:c="2"/></text:p>
      <text:p text:style-name="Standard"><text:soft-page-break/>mean <text:s text:c="39"/>54.15 <text:s text:c="2"/></text:p>
      <text:p text:style-name="Standard">std <text:s text:c="40"/>62.65 <text:s text:c="2"/></text:p>
      <text:p text:style-name="Standard">min <text:s text:c="41"/>0.00 <text:s text:c="2"/></text:p>
      <text:p text:style-name="Standard">25% <text:s text:c="41"/>0.00 <text:s text:c="2"/></text:p>
      <text:p text:style-name="Standard">50% <text:s text:c="41"/>0.00 <text:s text:c="2"/></text:p>
      <text:p text:style-name="Standard">75% <text:s text:c="39"/>117.54 <text:s text:c="2"/></text:p>
      <text:p text:style-name="Standard">max <text:s text:c="39"/>200.10 <text:s text:c="2"/></text:p>
      <text:p text:style-name="Standard"/>
      <text:p text:style-name="Standard"><text:s text:c="7"/>Water <text:s/>(component 4)(kg in a m^3 mixture) <text:s/>\</text:p>
      <text:p text:style-name="Standard">count <text:s text:c="35"/>1080.00 <text:s text:c="2"/></text:p>
      <text:p text:style-name="Standard">mean <text:s text:c="37"/>181.45 <text:s text:c="2"/></text:p>
      <text:p text:style-name="Standard">std <text:s text:c="39"/>21.03 <text:s text:c="2"/></text:p>
      <text:p text:style-name="Standard">min <text:s text:c="38"/>121.75 <text:s text:c="2"/></text:p>
      <text:p text:style-name="Standard">25% <text:s text:c="38"/>164.90 <text:s text:c="2"/></text:p>
      <text:p text:style-name="Standard">50% <text:s text:c="38"/>183.80 <text:s text:c="2"/></text:p>
      <text:p text:style-name="Standard">75% <text:s text:c="38"/>192.00 <text:s text:c="2"/></text:p>
      <text:p text:style-name="Standard">max <text:s text:c="38"/>247.00 <text:s text:c="2"/></text:p>
      <text:p text:style-name="Standard"/>
      <text:p text:style-name="Standard"><text:s text:c="7"/>Superplasticizer (component 5)(kg in a m^3 mixture) <text:s/>\</text:p>
      <text:p text:style-name="Standard">count <text:s text:c="43"/>1080.00 <text:s text:c="4"/></text:p>
      <text:p text:style-name="Standard">mean <text:s text:c="47"/>6.23 <text:s text:c="4"/></text:p>
      <text:p text:style-name="Standard">std <text:s text:c="48"/>5.94 <text:s text:c="4"/></text:p>
      <text:p text:style-name="Standard">min <text:s text:c="48"/>0.00 <text:s text:c="4"/></text:p>
      <text:p text:style-name="Standard">25% <text:s text:c="48"/>0.00 <text:s text:c="4"/></text:p>
      <text:p text:style-name="Standard">50% <text:s text:c="48"/>6.35 <text:s text:c="4"/></text:p>
      <text:p text:style-name="Standard">75% <text:s text:c="47"/>10.16 <text:s text:c="4"/></text:p>
      <text:p text:style-name="Standard">max <text:s text:c="47"/>32.20 <text:s text:c="4"/></text:p>
      <text:p text:style-name="Standard"/>
      <text:p text:style-name="Standard"><text:s text:c="7"/>Coarse Aggregate <text:s/>(component 6)(kg in a m^3 mixture) <text:s/>\</text:p>
      <text:p text:style-name="Standard">count <text:s text:c="43"/>1080.00 <text:s text:c="5"/></text:p>
      <text:p text:style-name="Standard">mean <text:s text:c="45"/>973.08 <text:s text:c="5"/></text:p>
      <text:p text:style-name="Standard">std <text:s text:c="47"/>77.45 <text:s text:c="5"/></text:p>
      <text:p text:style-name="Standard">min <text:s text:c="46"/>801.00 <text:s text:c="5"/></text:p>
      <text:p text:style-name="Standard">25% <text:s text:c="46"/>932.00 <text:s text:c="5"/></text:p>
      <text:p text:style-name="Standard">50% <text:s text:c="46"/>968.00 <text:s text:c="5"/></text:p>
      <text:p text:style-name="Standard">75% <text:s text:c="45"/>1029.40 <text:s text:c="5"/></text:p>
      <text:p text:style-name="Standard">max <text:s text:c="45"/>1145.00 <text:s text:c="5"/></text:p>
      <text:p text:style-name="Standard"/>
      <text:p text:style-name="Standard"><text:s text:c="7"/>Fine Aggregate (component 7)(kg in a m^3 mixture) <text:s/>Age (day) <text:s/>\</text:p>
      <text:p text:style-name="Standard">count <text:s text:c="43"/>1080.00 <text:s text:c="3"/>1080.00 <text:s text:c="2"/></text:p>
      <text:p text:style-name="Standard">mean <text:s text:c="45"/>773.39 <text:s text:c="5"/>45.39 <text:s text:c="2"/></text:p>
      <text:p text:style-name="Standard">std <text:s text:c="47"/>79.86 <text:s text:c="5"/>62.35 <text:s text:c="2"/></text:p>
      <text:p text:style-name="Standard">min <text:s text:c="46"/>594.00 <text:s text:c="6"/>1.00 <text:s text:c="2"/></text:p>
      <text:p text:style-name="Standard">25% <text:s text:c="46"/>732.05 <text:s text:c="5"/>14.00 <text:s text:c="2"/></text:p>
      <text:p text:style-name="Standard">50% <text:s text:c="46"/>779.32 <text:s text:c="5"/>28.00 <text:s text:c="2"/></text:p>
      <text:p text:style-name="Standard">75% <text:s text:c="46"/>822.65 <text:s text:c="5"/>56.00 <text:s text:c="2"/></text:p>
      <text:p text:style-name="Standard">max <text:s text:c="46"/>992.60 <text:s text:c="4"/>365.00 <text:s text:c="2"/></text:p>
      <text:p text:style-name="Standard"/>
      <text:p text:style-name="Standard"><text:s text:c="7"/>Concrete compressive strength(MPa, megapascals) <text:s text:c="2"/></text:p>
      <text:p text:style-name="Standard">count <text:s text:c="42"/>1080.00 <text:s/></text:p>
      <text:p text:style-name="Standard">mean <text:s text:c="45"/>35.91 <text:s/></text:p>
      <text:p text:style-name="Standard">std <text:s text:c="46"/>16.54 <text:s/></text:p>
      <text:p text:style-name="Standard"><text:soft-page-break/>min <text:s text:c="47"/>2.33 <text:s/></text:p>
      <text:p text:style-name="Standard">25% <text:s text:c="46"/>23.88 <text:s/></text:p>
      <text:p text:style-name="Standard">50% <text:s text:c="46"/>34.35 <text:s/></text:p>
      <text:p text:style-name="Standard">75% <text:s text:c="46"/>46.09 <text:s/></text:p>
      <text:p text:style-name="Standard">max <text:s text:c="46"/>82.60 <text:s/></text:p>
      <text:p text:style-name="Standard"/>
      <text:p text:style-name="Standard">=== KNN IMPUTED ===</text:p>
      <text:p text:style-name="Standard"><text:s text:c="7"/>Cement (component 1)(kg in a m^3 mixture) <text:s/>\</text:p>
      <text:p text:style-name="Standard">count <text:s text:c="35"/>1080.00 <text:s text:c="2"/></text:p>
      <text:p text:style-name="Standard">mean <text:s text:c="37"/>281.06 <text:s text:c="2"/></text:p>
      <text:p text:style-name="Standard">std <text:s text:c="38"/>103.88 <text:s text:c="2"/></text:p>
      <text:p text:style-name="Standard">min <text:s text:c="38"/>102.00 <text:s text:c="2"/></text:p>
      <text:p text:style-name="Standard">25% <text:s text:c="38"/>194.38 <text:s text:c="2"/></text:p>
      <text:p text:style-name="Standard">50% <text:s text:c="38"/>271.96 <text:s text:c="2"/></text:p>
      <text:p text:style-name="Standard">75% <text:s text:c="38"/>350.00 <text:s text:c="2"/></text:p>
      <text:p text:style-name="Standard">max <text:s text:c="38"/>540.00 <text:s text:c="2"/></text:p>
      <text:p text:style-name="Standard"/>
      <text:p text:style-name="Standard"><text:s text:c="7"/>Blast Furnace Slag (component 2)(kg in a m^3 mixture) <text:s/>\</text:p>
      <text:p text:style-name="Standard">count <text:s text:c="43"/>1080.00 <text:s text:c="6"/></text:p>
      <text:p text:style-name="Standard">mean <text:s text:c="46"/>74.34 <text:s text:c="6"/></text:p>
      <text:p text:style-name="Standard">std <text:s text:c="47"/>85.49 <text:s text:c="6"/></text:p>
      <text:p text:style-name="Standard">min <text:s text:c="48"/>0.00 <text:s text:c="6"/></text:p>
      <text:p text:style-name="Standard">25% <text:s text:c="48"/>0.00 <text:s text:c="6"/></text:p>
      <text:p text:style-name="Standard">50% <text:s text:c="47"/>24.00 <text:s text:c="6"/></text:p>
      <text:p text:style-name="Standard">75% <text:s text:c="46"/>142.50 <text:s text:c="6"/></text:p>
      <text:p text:style-name="Standard">max <text:s text:c="46"/>359.40 <text:s text:c="6"/></text:p>
      <text:p text:style-name="Standard"/>
      <text:p text:style-name="Standard"><text:s text:c="7"/>Fly Ash (component 3)(kg in a m^3 mixture) <text:s/>\</text:p>
      <text:p text:style-name="Standard">count <text:s text:c="36"/>1080.00 <text:s text:c="2"/></text:p>
      <text:p text:style-name="Standard">mean <text:s text:c="39"/>54.45 <text:s text:c="2"/></text:p>
      <text:p text:style-name="Standard">std <text:s text:c="40"/>63.55 <text:s text:c="2"/></text:p>
      <text:p text:style-name="Standard">min <text:s text:c="41"/>0.00 <text:s text:c="2"/></text:p>
      <text:p text:style-name="Standard">25% <text:s text:c="41"/>0.00 <text:s text:c="2"/></text:p>
      <text:p text:style-name="Standard">50% <text:s text:c="41"/>0.00 <text:s text:c="2"/></text:p>
      <text:p text:style-name="Standard">75% <text:s text:c="39"/>118.27 <text:s text:c="2"/></text:p>
      <text:p text:style-name="Standard">max <text:s text:c="39"/>200.10 <text:s text:c="2"/></text:p>
      <text:p text:style-name="Standard"/>
      <text:p text:style-name="Standard"><text:s text:c="7"/>Water <text:s/>(component 4)(kg in a m^3 mixture) <text:s/>\</text:p>
      <text:p text:style-name="Standard">count <text:s text:c="35"/>1080.00 <text:s text:c="2"/></text:p>
      <text:p text:style-name="Standard">mean <text:s text:c="37"/>181.38 <text:s text:c="2"/></text:p>
      <text:p text:style-name="Standard">std <text:s text:c="39"/>21.31 <text:s text:c="2"/></text:p>
      <text:p text:style-name="Standard">min <text:s text:c="38"/>121.75 <text:s text:c="2"/></text:p>
      <text:p text:style-name="Standard">25% <text:s text:c="38"/>164.90 <text:s text:c="2"/></text:p>
      <text:p text:style-name="Standard">50% <text:s text:c="38"/>184.94 <text:s text:c="2"/></text:p>
      <text:p text:style-name="Standard">75% <text:s text:c="38"/>192.00 <text:s text:c="2"/></text:p>
      <text:p text:style-name="Standard">max <text:s text:c="38"/>247.00 <text:s text:c="2"/></text:p>
      <text:p text:style-name="Standard"/>
      <text:p text:style-name="Standard"><text:s text:c="7"/>Superplasticizer (component 5)(kg in a m^3 mixture) <text:s/>\</text:p>
      <text:p text:style-name="Standard">count <text:s text:c="43"/>1080.00 <text:s text:c="4"/></text:p>
      <text:p text:style-name="Standard">mean <text:s text:c="47"/>6.23 <text:s text:c="4"/></text:p>
      <text:p text:style-name="Standard">std <text:s text:c="48"/>5.94 <text:s text:c="4"/></text:p>
      <text:p text:style-name="Standard">min <text:s text:c="48"/>0.00 <text:s text:c="4"/></text:p>
      <text:p text:style-name="Standard"><text:soft-page-break/>25% <text:s text:c="48"/>0.00 <text:s text:c="4"/></text:p>
      <text:p text:style-name="Standard">50% <text:s text:c="48"/>6.35 <text:s text:c="4"/></text:p>
      <text:p text:style-name="Standard">75% <text:s text:c="47"/>10.16 <text:s text:c="4"/></text:p>
      <text:p text:style-name="Standard">max <text:s text:c="47"/>32.20 <text:s text:c="4"/></text:p>
      <text:p text:style-name="Standard"/>
      <text:p text:style-name="Standard"><text:s text:c="7"/>Coarse Aggregate <text:s/>(component 6)(kg in a m^3 mixture) <text:s/>\</text:p>
      <text:p text:style-name="Standard">count <text:s text:c="43"/>1080.00 <text:s text:c="5"/></text:p>
      <text:p text:style-name="Standard">mean <text:s text:c="45"/>973.08 <text:s text:c="5"/></text:p>
      <text:p text:style-name="Standard">std <text:s text:c="47"/>77.45 <text:s text:c="5"/></text:p>
      <text:p text:style-name="Standard">min <text:s text:c="46"/>801.00 <text:s text:c="5"/></text:p>
      <text:p text:style-name="Standard">25% <text:s text:c="46"/>932.00 <text:s text:c="5"/></text:p>
      <text:p text:style-name="Standard">50% <text:s text:c="46"/>968.00 <text:s text:c="5"/></text:p>
      <text:p text:style-name="Standard">75% <text:s text:c="45"/>1029.40 <text:s text:c="5"/></text:p>
      <text:p text:style-name="Standard">max <text:s text:c="45"/>1145.00 <text:s text:c="5"/></text:p>
      <text:p text:style-name="Standard"/>
      <text:p text:style-name="Standard"><text:s text:c="7"/>Fine Aggregate (component 7)(kg in a m^3 mixture) <text:s/>Age (day) <text:s/>\</text:p>
      <text:p text:style-name="Standard">count <text:s text:c="43"/>1080.00 <text:s text:c="3"/>1080.00 <text:s text:c="2"/></text:p>
      <text:p text:style-name="Standard">mean <text:s text:c="45"/>773.39 <text:s text:c="5"/>45.39 <text:s text:c="2"/></text:p>
      <text:p text:style-name="Standard">std <text:s text:c="47"/>79.86 <text:s text:c="5"/>62.35 <text:s text:c="2"/></text:p>
      <text:p text:style-name="Standard">min <text:s text:c="46"/>594.00 <text:s text:c="6"/>1.00 <text:s text:c="2"/></text:p>
      <text:p text:style-name="Standard">25% <text:s text:c="46"/>732.05 <text:s text:c="5"/>14.00 <text:s text:c="2"/></text:p>
      <text:p text:style-name="Standard">50% <text:s text:c="46"/>779.32 <text:s text:c="5"/>28.00 <text:s text:c="2"/></text:p>
      <text:p text:style-name="Standard">75% <text:s text:c="46"/>822.65 <text:s text:c="5"/>56.00 <text:s text:c="2"/></text:p>
      <text:p text:style-name="Standard">max <text:s text:c="46"/>992.60 <text:s text:c="4"/>365.00 <text:s text:c="2"/></text:p>
      <text:p text:style-name="Standard"/>
      <text:p text:style-name="Standard"><text:s text:c="7"/>Concrete compressive strength(MPa, megapascals) <text:s text:c="2"/></text:p>
      <text:p text:style-name="Standard">count <text:s text:c="42"/>1080.00 <text:s/></text:p>
      <text:p text:style-name="Standard">mean <text:s text:c="45"/>35.91 <text:s/></text:p>
      <text:p text:style-name="Standard">std <text:s text:c="46"/>16.54 <text:s/></text:p>
      <text:p text:style-name="Standard">min <text:s text:c="47"/>2.33 <text:s/></text:p>
      <text:p text:style-name="Standard">25% <text:s text:c="46"/>23.88 <text:s/></text:p>
      <text:p text:style-name="Standard">50% <text:s text:c="46"/>34.35 <text:s/></text:p>
      <text:p text:style-name="Standard">75% <text:s text:c="46"/>46.09 <text:s/></text:p>
      <text:p text:style-name="Standard">max <text:s text:c="46"/>82.60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5:34:32.510388900</meta:creation-date>
    <dc:date>2026-05-03T15:34:56.260323600</dc:date>
    <meta:editing-duration>PT24S</meta:editing-duration>
    <meta:editing-cycles>1</meta:editing-cycles>
    <meta:document-statistic meta:table-count="0" meta:image-count="0" meta:object-count="0" meta:page-count="5" meta:paragraph-count="219" meta:word-count="620" meta:character-count="12663" meta:non-whitespace-character-count="2904"/>
    <meta:generator>LibreOffice/25.8.5.2$Windows_X86_64 LibreOffice_project/9c8b85f387cc00a89945a79c9e6239f32e450ac2</meta:generator>
  </office:meta>
</office:document-meta>
</file>